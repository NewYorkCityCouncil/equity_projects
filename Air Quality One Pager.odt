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line-height="100%"/>
    </style:style>
    <style:style style:name="T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1" style:parent-style-name="Normal" style:family="paragraph">
      <style:paragraph-properties fo:line-height="100%"/>
      <style:text-properties style:font-name="Aptos" style:font-name-asian="Aptos" style:font-name-complex="Aptos" fo:font-size="11pt" style:font-size-asian="11pt" style:font-size-complex="11pt"/>
    </style:style>
    <style:style style:name="P12" style:parent-style-name="Normal" style:family="paragraph">
      <style:paragraph-properties fo:line-height="100%"/>
      <style:text-properties style:font-name="Aptos" style:font-name-asian="Aptos" style:font-name-complex="Aptos" fo:font-size="11pt" style:font-size-asian="11pt" style:font-size-complex="11pt"/>
    </style:style>
    <style:style style:name="P1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4" style:parent-style-name="Normal" style:family="paragraph">
      <style:paragraph-properties fo:break-before="page" fo:line-height="100%"/>
    </style:style>
    <style:style style:name="P15" style:parent-style-name="Normal" style:family="paragraph">
      <style:paragraph-properties fo:line-height="10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line-height="100%"/>
      <style:text-properties fo:font-style="italic" style:font-style-asian="italic" style:font-style-complex="italic"/>
    </style:style>
    <style:style style:name="P17" style:parent-style-name="ListParagraph" style:list-style-name="LFO1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18" style:parent-style-name="ListParagraph" style:list-style-name="LFO1" style:family="paragraph">
      <style:paragraph-properties fo:margin-bottom="0in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21" style:parent-style-name="ListParagraph" style:list-style-name="LFO1" style:family="paragraph">
      <style:paragraph-properties fo:margin-bottom="0in"/>
    </style:style>
    <style:style style:name="T22" style:parent-style-name="Hyperlink" style:family="text">
      <style:text-properties fo:font-weight="bold" style:font-weight-asian="bold" style:font-weight-complex="bold" fo:font-size="11pt" style:font-size-asian="11pt" style:font-size-complex="11pt"/>
    </style:style>
    <style:style style:name="P23" style:parent-style-name="ListParagraph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24" style:parent-style-name="Normal" style:family="paragraph">
      <style:paragraph-properties fo:line-height="100%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Normal" style:family="paragraph">
      <style:paragraph-properties fo:line-height="100%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P28" style:parent-style-name="Normal" style:family="paragraph">
      <style:paragraph-properties fo:line-height="100%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Normal" style:family="paragraph">
      <style:paragraph-properties fo:line-height="100%"/>
      <style:text-properties fo:font-style="italic" style:font-style-asian="italic" style:font-style-complex="italic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  <style:text-properties style:font-name="Aptos" style:font-name-asian="Aptos" style:font-name-complex="Aptos" fo:font-size="11pt" style:font-size-asian="11pt" style:font-size-complex="11pt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6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ir Quality</text:p>
      <text:p text:style-name="P2"><draw:frame draw:z-index="251657216" draw:style-name="a0" draw:name="drawing" text:anchor-type="paragraph" svg:x="0in" svg:y="0in" svg:width="3.87885in" svg:height="3.00695in" style:rel-width="scale" style:rel-height="scale"><draw:image xlink:href="media/image1.png" xlink:type="simple" xlink:show="embed" xlink:actuate="onLoad"/><svg:title/><svg:desc/></draw:frame><text:span text:style-name="T3">There are only 14 PM2.5 sensors in<text:s/></text:span><text:span text:style-name="T4">all of</text:span><text:span text:style-name="T5"><text:s/>New York City</text:span><text:span text:style-name="T6">, which presents difficulties<text:s/></text:span><text:span text:style-name="T7">whe</text:span><text:span text:style-name="T8">n comparing air quality between different neighborhoods</text:span><text:span text:style-name="T9">.</text:span><text:span text:style-name="T10"><text:s/></text:span></text:p>
      <text:p text:style-name="P11">Additionally,<text:s/>areas<text:s/>with the worst air quality do not<text:s/>also<text:s/>have the worst air quality-related health<text:s/>impacts.<text:s/></text:p>
      <text:p text:style-name="P12">The<text:s/>greatest potential to improve public health lies in policies that<text:s/>address<text:s/>the negative health impacts of air quality, and how it is inequitably distributed across the city, rather than air quality itself.<text:s/></text:p>
      <text:p text:style-name="P13"/>
      <text:p text:style-name="P14"/>
      <text:p text:style-name="P15">Air Quality Impacts</text:p>
      <text:p text:style-name="P16">Data Sources</text:p>
      <text:list text:style-name="LFO1" text:continue-numbering="true">
        <text:list-item>
          <text:p text:style-name="P17">New York City Community Health Profiles</text:p>
        </text:list-item>
        <text:list-item>
          <text:p text:style-name="P18"><text:span text:style-name="T19">Councilcount<text:s/></text:span><text:span text:style-name="T20">for demographics</text:span></text:p>
        </text:list-item>
        <text:list-item>
          <text:p text:style-name="P21"><text:a xlink:href="https://data.cityofnewyork.us/Housing-Development/Housing-Maintenance-Code-Violations/wvxf-dwi5/about_data" office:target-frame-name="_top" xlink:show="replace"><text:span text:style-name="T22">Housing Maintenance Code Violations</text:span></text:a></text:p>
        </text:list-item>
      </text:list>
      <text:p text:style-name="P23"/>
      <text:p text:style-name="P24"><text:span text:style-name="T25">Analysis</text:span></text:p>
      <text:p text:style-name="P26"><draw:frame draw:z-index="251658240" draw:style-name="a1" draw:name="drawing" text:anchor-type="paragraph" svg:x="0in" svg:y="0in" svg:width="4.15937in" svg:height="2.28632in" style:rel-width="scale" style:rel-height="scale"><draw:image xlink:href="media/image2.png" xlink:type="simple" xlink:show="embed" xlink:actuate="onLoad"/><svg:title/><svg:desc/></draw:frame><text:span text:style-name="T27">At the community district level, % of households receiving SNAP, % Hispanic/Latino, and % Black were demographic factors found to be statistically significantly associated with increased rates of child asthma hospitalizations.<text:s/></text:span></text:p>
      <text:p text:style-name="P28"><text:span text:style-name="T29">Although there is an established relationship between housing characteristics, such as<text:s/></text:span><text:span text:style-name="T30">moisture and mold, pest and rodent infestations, secondhand smoke, volatile organic compounds</text:span><text:span text:style-name="T31"><text:s/>(VOCs)</text:span><text:span text:style-name="T32">, and inadequate ventilation, and asthma, th</text:span><text:span text:style-name="T33">e rate of<text:s/></text:span><text:span text:style-name="T34">housing maintenance code violations (</text:span><text:span text:style-name="T35">HMCVs</text:span><text:span text:style-name="T36">)</text:span><text:span text:style-name="T37"><text:s/>was not found to be statistically associated.<text:s/></text:span></text:p>
      <text:p text:style-name="P38">Key neighborhoods</text:p>
      <text:p text:style-name="P39"><draw:frame draw:style-name="a2" draw:name="drawing" text:anchor-type="as-char" svg:x="0in" svg:y="0in" svg:width="3.37032in" svg:height="2.76346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3.39463in" svg:height="2.78845in" style:rel-width="scale" style:rel-height="scale"><draw:image xlink:href="media/image4.png" xlink:type="simple" xlink:show="embed" xlink:actuate="onLoad"/><svg:title/><svg:desc/></draw:frame></text:p>
      <text:p text:style-name="P40">Children living in the Bronx and parts of Upper Manhattan experience the highest rates of hospitalization for asthma cases, as well as a lower rate of HMCVs in comparison to other similarly situated districts – potentially highlighting the need for further intervention. The top community districts<text:s/>for childhood asthma<text:s/>include:<text:s/></text:p>
      <text:p text:style-name="P41"><text:span text:style-name="T42">Mott Haven and Melrose (CD1</text:span><text:span text:style-name="T43">,<text:s/></text:span><text:span text:style-name="T44">201</text:span><text:span text:style-name="T45">):</text:span><text:span text:style-name="T46"><text:s/>541.4 hospitalizations per 10k children</text:span></text:p>
      <text:p text:style-name="P47"><text:span text:style-name="T48">Central Harlem (CD10</text:span><text:span text:style-name="T49">, 110</text:span><text:span text:style-name="T50">):</text:span><text:span text:style-name="T51"><text:s/>511.1 hospitalizations per 10k children</text:span></text:p>
      <text:p text:style-name="P52"><text:span text:style-name="T53">East Harlem (CD11</text:span><text:span text:style-name="T54">, 111</text:span><text:span text:style-name="T55">):</text:span><text:span text:style-name="T56"><text:s/>506.3 hospitalizations per 10k children</text:span></text:p>
      <text:p text:style-name="P57"><text:span text:style-name="T58">Brownsville (CD16</text:span><text:span text:style-name="T59">, 316</text:span><text:span text:style-name="T60">):</text:span><text:span text:style-name="T61"><text:s/>450.6 hospitalizations per 10k childr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rota, Reese</meta:initial-creator>
    <dc:creator>Lopez-Jensen, Lukas</dc:creator>
    <meta:creation-date>2026-07-23T16:19:00Z</meta:creation-date>
    <dc:date>2026-07-23T16:19:00Z</dc:date>
    <meta:template xlink:href="Normal.dotm" xlink:type="simple"/>
    <meta:editing-cycles>1</meta:editing-cycles>
    <meta:editing-duration>PT0S</meta:editing-duration>
    <meta:document-statistic meta:page-count="1" meta:paragraph-count="3" meta:word-count="289" meta:character-count="1939" meta:row-count="13" meta:non-whitespace-character-count="1653"/>
  </office:meta>
</office:document-meta>
</file>